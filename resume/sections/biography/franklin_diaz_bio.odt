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anklin Diaz has held various positions in network operations, software development and test over the past 15 years. He is a Senior Software engineer on the techinical staff in the Cellular Infrastructure Division of Motorola, Inc. <text:s/>He holds a degree in Computer Science from Roosevelt University in Chicago and a Master of Science in Computer Information Systems from Northwestern University. He is currently pursuing a Master's Degree in Network Engineering and Management at DePaul University in Chicago an teaching classes in Information Systems at McHenry County College in Cyrystal Lake, IL. Has held Cisco CCNA, CCDA, and CCNP certifications in the past. He lives in Crystal Lake Illinois with his wife, two sons and two cats. </text:p>
      <text:p text:style-name="Standard"/>
      <text:p text:style-name="Standard"/>
      <text:p text:style-name="Standard">Work </text:p>
      <text:p text:style-name="Standard"/>
      <text:list xml:id="list32563412" text:style-name="L1">
        <text:list-item>
          <text:p text:style-name="P1">Working in Motorola Cellular Infrastructure Division since January 1998 </text:p>
          <text:list>
            <text:list-item>
              <text:p text:style-name="P1">Software Feature Test Lead </text:p>
            </text:list-item>
            <text:list-item>
              <text:p text:style-name="P1">Software Developer </text:p>
            </text:list-item>
          </text:list>
        </text:list-item>
        <text:list-item>
          <text:p text:style-name="P1">Teaching at McHenry County College since Fall 2007</text:p>
          <text:list>
            <text:list-item>
              <text:p text:style-name="P1">Information Systems classes like UNIX and Internet</text:p>
            </text:list-item>
            <text:list-item>
              <text:p text:style-name="P1">Built a small Linux/Hadoop cluster for the school</text:p>
            </text:list-item>
          </text:list>
        </text:list-item>
      </text:list>
      <text:p text:style-name="Standard"/>
      <text:p text:style-name="Standard">School</text:p>
      <text:p text:style-name="Standard"/>
      <text:list xml:id="list32666111" text:style-name="L2">
        <text:list-item>
          <text:p text:style-name="P2">BS Computer Science, Roosevelt University</text:p>
        </text:list-item>
        <text:list-item>
          <text:p text:style-name="P2">MS Comp Information Systems, Northwestern University</text:p>
        </text:list-item>
        <text:list-item>
          <text:p text:style-name="P2">MS Network Engineering &amp; Management, DePaul University (expected)</text:p>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47M14S</meta:editing-duration>
    <meta:editing-cycles>7</meta:editing-cycles>
    <meta:generator>OpenOffice.org/3.2$Win32 OpenOffice.org_project/320m18$Build-9502</meta:generator>
    <dc:date>2010-10-09T13:03:02.07</dc:date>
    <dc:creator>Franklin </dc:creator>
    <meta:document-statistic meta:table-count="0" meta:image-count="0" meta:object-count="0" meta:page-count="1" meta:paragraph-count="12" meta:word-count="184" meta:character-count="1180"/>
    <meta:user-defined meta:name="Info 1"/>
    <meta:user-defined meta:name="Info 2"/>
    <meta:user-defined meta:name="Info 3"/>
    <meta:user-defined meta:name="Info 4"/>
  </office:meta>
</office:document-meta>
</file>